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ona 1 — Busy Young Professional</text:h>
      <text:h text:style-name="Heading_20_3" text:outline-level="3">Name</text:h>
      <text:p text:style-name="Text_20_body">Sarah Mitchell</text:p>
      <text:h text:style-name="Heading_20_3" text:outline-level="3">Demographics</text:h>
      <text:list text:style-name="L1">
        <text:list-item>
          <text:p text:style-name="P2">Age: 29 </text:p>
        </text:list-item>
        <text:list-item>
          <text:p text:style-name="P2">Occupation: Marketing Specialist </text:p>
        </text:list-item>
        <text:list-item>
          <text:p text:style-name="P2">Location: Urban city apartment </text:p>
        </text:list-item>
        <text:list-item>
          <text:p text:style-name="P2">Tech Skill Level: High </text:p>
        </text:list-item>
        <text:list-item>
          <text:p text:style-name="P1">Devices: Mobile phone + laptop </text:p>
        </text:list-item>
      </text:list>
      <text:h text:style-name="Heading_20_3" text:outline-level="3">Background</text:h>
      <text:p text:style-name="Text_20_body">Sarah works long hours and often struggles to decide what to cook after work. She wants to avoid ordering takeout and improve her eating habits but doesn’t have much time for planning meals manually.</text:p>
      <text:h text:style-name="Heading_20_3" text:outline-level="3">Goals</text:h>
      <text:list text:style-name="L2">
        <text:list-item>
          <text:p text:style-name="P4">Plan meals quickly for the week </text:p>
        </text:list-item>
        <text:list-item>
          <text:p text:style-name="P4">Save time during weekdays </text:p>
        </text:list-item>
        <text:list-item>
          <text:p text:style-name="P4">Discover easy and healthy recipes </text:p>
        </text:list-item>
        <text:list-item>
          <text:p text:style-name="P4">Avoid repeating the same meals </text:p>
        </text:list-item>
        <text:list-item>
          <text:p text:style-name="P3">Access meal plans on mobile </text:p>
        </text:list-item>
      </text:list>
      <text:h text:style-name="Heading_20_3" text:outline-level="3">Frustrations / Pain Points</text:h>
      <text:list text:style-name="L3">
        <text:list-item>
          <text:p text:style-name="P6">Forgetting ingredients while shopping </text:p>
        </text:list-item>
        <text:list-item>
          <text:p text:style-name="P6">Spending too much money on takeout </text:p>
        </text:list-item>
        <text:list-item>
          <text:p text:style-name="P6">Difficulty organizing recipes </text:p>
        </text:list-item>
        <text:list-item>
          <text:p text:style-name="P5">Meal planning feels overwhelming </text:p>
        </text:list-item>
      </text:list>
      <text:h text:style-name="Heading_20_3" text:outline-level="3">Features Most Important to Sarah</text:h>
      <text:list text:style-name="L4">
        <text:list-item>
          <text:p text:style-name="P8">Weekly meal planner </text:p>
        </text:list-item>
        <text:list-item>
          <text:p text:style-name="P8">Recipe search and filtering </text:p>
        </text:list-item>
        <text:list-item>
          <text:p text:style-name="P8">Quick recipe browsing </text:p>
        </text:list-item>
        <text:list-item>
          <text:p text:style-name="P8">Mobile-responsive design </text:p>
        </text:list-item>
        <text:list-item>
          <text:p text:style-name="P8">Save and edit recipes </text:p>
        </text:list-item>
        <text:list-item>
          <text:p text:style-name="P7">Dietary filters (healthy/vegetarian) </text:p>
        </text:list-item>
      </text:list>
      <text:h text:style-name="Heading_20_3" text:outline-level="3">Typical User Story</text:h>
      <text:p text:style-name="Quotations">“As a busy professional, I want to schedule meals for the week so that I can save time and avoid last-minute food decisions.”</text:p>
      <text:p text:style-name="Horizontal_20_Line"/>
      <text:h text:style-name="Heading_20_2" text:outline-level="2"><text:soft-page-break/>Persona 2 — Health-Conscious Parent</text:h>
      <text:h text:style-name="Heading_20_3" text:outline-level="3">Name</text:h>
      <text:p text:style-name="Text_20_body">Michael Rodriguez</text:p>
      <text:h text:style-name="Heading_20_3" text:outline-level="3">Demographics</text:h>
      <text:list text:style-name="L5">
        <text:list-item>
          <text:p text:style-name="P10">Age: 41 </text:p>
        </text:list-item>
        <text:list-item>
          <text:p text:style-name="P10">Occupation: Teacher </text:p>
        </text:list-item>
        <text:list-item>
          <text:p text:style-name="P10">Family: Married with 2 children </text:p>
        </text:list-item>
        <text:list-item>
          <text:p text:style-name="P10">Tech Skill Level: Medium </text:p>
        </text:list-item>
        <text:list-item>
          <text:p text:style-name="P9">Devices: Tablet + desktop </text:p>
        </text:list-item>
      </text:list>
      <text:h text:style-name="Heading_20_3" text:outline-level="3">Background</text:h>
      <text:p text:style-name="Text_20_body">Michael plans meals for his entire family and needs recipes that fit different dietary needs. He wants a reliable system to organize family meals and reduce food waste.</text:p>
      <text:h text:style-name="Heading_20_3" text:outline-level="3">Goals</text:h>
      <text:list text:style-name="L6">
        <text:list-item>
          <text:p text:style-name="P12">Create balanced weekly meal plans </text:p>
        </text:list-item>
        <text:list-item>
          <text:p text:style-name="P12">Organize family-friendly recipes </text:p>
        </text:list-item>
        <text:list-item>
          <text:p text:style-name="P12">Reduce grocery waste </text:p>
        </text:list-item>
        <text:list-item>
          <text:p text:style-name="P12">Track dietary preferences </text:p>
        </text:list-item>
        <text:list-item>
          <text:p text:style-name="P11">Reuse favorite recipes </text:p>
        </text:list-item>
      </text:list>
      <text:h text:style-name="Heading_20_3" text:outline-level="3">Frustrations / Pain Points</text:h>
      <text:list text:style-name="L7">
        <text:list-item>
          <text:p text:style-name="P14">Kids are picky eaters </text:p>
        </text:list-item>
        <text:list-item>
          <text:p text:style-name="P14">Hard to remember successful meals </text:p>
        </text:list-item>
        <text:list-item>
          <text:p text:style-name="P14">Food expires before being used </text:p>
        </text:list-item>
        <text:list-item>
          <text:p text:style-name="P13">Family meal coordination is stressful </text:p>
        </text:list-item>
      </text:list>
      <text:h text:style-name="Heading_20_3" text:outline-level="3">Features Most Important to Michael</text:h>
      <text:list text:style-name="L8">
        <text:list-item>
          <text:p text:style-name="P16">Weekly calendar planner </text:p>
        </text:list-item>
        <text:list-item>
          <text:p text:style-name="P16">Recipe CRUD system </text:p>
        </text:list-item>
        <text:list-item>
          <text:p text:style-name="P16">Dietary type filtering </text:p>
        </text:list-item>
        <text:list-item>
          <text:p text:style-name="P16">Recipe image uploads </text:p>
        </text:list-item>
        <text:list-item>
          <text:p text:style-name="P16">View/edit planned meals </text:p>
        </text:list-item>
        <text:list-item>
          <text:p text:style-name="P15">Search recipes by ingredients or meal type </text:p>
        </text:list-item>
      </text:list>
      <text:h text:style-name="Heading_20_3" text:outline-level="3">Typical User Story</text:h>
      <text:p text:style-name="Quotations">“As a parent, I want to organize meals for my family so that grocery shopping and cooking become easier and less wasteful.”</text:p>
      <text:p text:style-name="Horizontal_20_Line"/>
      <text:h text:style-name="Heading_20_2" text:outline-level="2"><text:soft-page-break/>Persona 3 — Platform Administrator</text:h>
      <text:h text:style-name="Heading_20_3" text:outline-level="3">Name</text:h>
      <text:p text:style-name="Text_20_body">Emma Chen</text:p>
      <text:h text:style-name="Heading_20_3" text:outline-level="3">Demographics</text:h>
      <text:list text:style-name="L9">
        <text:list-item>
          <text:p text:style-name="P18">Age: 35 </text:p>
        </text:list-item>
        <text:list-item>
          <text:p text:style-name="P18">Occupation: System Administrator </text:p>
        </text:list-item>
        <text:list-item>
          <text:p text:style-name="P18">Tech Skill Level: Advanced </text:p>
        </text:list-item>
        <text:list-item>
          <text:p text:style-name="P17">Devices: Desktop workstation </text:p>
        </text:list-item>
      </text:list>
      <text:h text:style-name="Heading_20_3" text:outline-level="3">Background</text:h>
      <text:p text:style-name="Text_20_body">Emma manages the platform to ensure recipes are appropriate, users follow community guidelines, and the application runs smoothly. She oversees user accounts and recipe moderation.</text:p>
      <text:h text:style-name="Heading_20_3" text:outline-level="3">Goals</text:h>
      <text:list text:style-name="L10">
        <text:list-item>
          <text:p text:style-name="P20">Manage users efficiently </text:p>
        </text:list-item>
        <text:list-item>
          <text:p text:style-name="P20">Moderate inappropriate recipes/content </text:p>
        </text:list-item>
        <text:list-item>
          <text:p text:style-name="P20">Ensure platform security </text:p>
        </text:list-item>
        <text:list-item>
          <text:p text:style-name="P20">Monitor user activity and meal plans </text:p>
        </text:list-item>
        <text:list-item>
          <text:p text:style-name="P19">Maintain data accuracy </text:p>
        </text:list-item>
      </text:list>
      <text:h text:style-name="Heading_20_3" text:outline-level="3">Frustrations / Pain Points</text:h>
      <text:list text:style-name="L11">
        <text:list-item>
          <text:p text:style-name="P22">Spam or inappropriate recipe uploads </text:p>
        </text:list-item>
        <text:list-item>
          <text:p text:style-name="P22">Managing blocked users manually </text:p>
        </text:list-item>
        <text:list-item>
          <text:p text:style-name="P22">Difficulty tracking reported content </text:p>
        </text:list-item>
        <text:list-item>
          <text:p text:style-name="P21">Maintaining system security </text:p>
        </text:list-item>
      </text:list>
      <text:h text:style-name="Heading_20_3" text:outline-level="3">Features Most Important to Emma</text:h>
      <text:list text:style-name="L12">
        <text:list-item>
          <text:p text:style-name="P24">Admin authentication </text:p>
        </text:list-item>
        <text:list-item>
          <text:p text:style-name="P24">User management dashboard </text:p>
        </text:list-item>
        <text:list-item>
          <text:p text:style-name="P24">Full CRUD access to all recipes </text:p>
        </text:list-item>
        <text:list-item>
          <text:p text:style-name="P24">Block/unblock user accounts </text:p>
        </text:list-item>
        <text:list-item>
          <text:p text:style-name="P24">View all meal plans </text:p>
        </text:list-item>
        <text:list-item>
          <text:p text:style-name="P23">Authorization and security controls </text:p>
        </text:list-item>
      </text:list>
      <text:h text:style-name="Heading_20_3" text:outline-level="3">Typical User Story</text:h>
      <text:p text:style-name="Quotations">“As an admin, I want to manage recipes and users so that the platform remains safe, organized, and functional for everyone.”</text:p>
      <text:h text:style-name="Heading_20_1" text:outline-level="1"><text:soft-page-break/>Persona 4 — University Student</text:h>
      <text:h text:style-name="Heading_20_3" text:outline-level="3">Jake Wilson</text:h>
      <text:list text:style-name="L13">
        <text:list-item>
          <text:p text:style-name="P26"><text:span text:style-name="Strong_20_Emphasis">Age:</text:span> 21 </text:p>
        </text:list-item>
        <text:list-item>
          <text:p text:style-name="P26"><text:span text:style-name="Strong_20_Emphasis">Occupation:</text:span> University Student </text:p>
        </text:list-item>
        <text:list-item>
          <text:p text:style-name="P26"><text:span text:style-name="Strong_20_Emphasis">Goals:</text:span> </text:p>
          <text:list>
            <text:list-item>
              <text:p text:style-name="P26">Plan cheap and easy meals </text:p>
            </text:list-item>
            <text:list-item>
              <text:p text:style-name="P26">Save cooking time </text:p>
            </text:list-item>
            <text:list-item>
              <text:p text:style-name="P26">Learn new recipes </text:p>
            </text:list-item>
          </text:list>
        </text:list-item>
        <text:list-item>
          <text:p text:style-name="P26"><text:span text:style-name="Strong_20_Emphasis">Pain Points:</text:span> </text:p>
          <text:list>
            <text:list-item>
              <text:p text:style-name="P26">Limited budget </text:p>
            </text:list-item>
            <text:list-item>
              <text:p text:style-name="P26">Doesn’t know what to cook </text:p>
            </text:list-item>
            <text:list-item>
              <text:p text:style-name="P26">Eats unhealthy fast food often </text:p>
            </text:list-item>
          </text:list>
        </text:list-item>
        <text:list-item>
          <text:p text:style-name="P26"><text:span text:style-name="Strong_20_Emphasis">Key Features Needed:</text:span> </text:p>
          <text:list>
            <text:list-item>
              <text:p text:style-name="P26">Simple recipe browsing </text:p>
            </text:list-item>
            <text:list-item>
              <text:p text:style-name="P26">Quick meal planning </text:p>
            </text:list-item>
            <text:list-item>
              <text:p text:style-name="P26">Budget-friendly recipes </text:p>
            </text:list-item>
            <text:list-item>
              <text:p text:style-name="P25">Mobile access </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07T14:06:44.085000000</meta:creation-date>
    <dc:date>2026-05-07T14:27:40.284000000</dc:date>
    <meta:editing-duration>PT7M38S</meta:editing-duration>
    <meta:editing-cycles>2</meta:editing-cycles>
    <meta:generator>LibreOffice/7.5.2.2$Windows_X86_64 LibreOffice_project/53bb9681a964705cf672590721dbc85eb4d0c3a2</meta:generator>
    <meta:document-statistic meta:table-count="0" meta:image-count="0" meta:object-count="0" meta:page-count="4" meta:paragraph-count="109" meta:word-count="566" meta:character-count="3432" meta:non-whitespace-character-count="2971"/>
  </office:meta>
</office:document-meta>
</file>